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Roboto Mono" style:font-name-asian="Roboto Mono1" style:font-name-complex="Roboto Mono1"/>
    </style:style>
    <style:style style:name="P3" style:family="paragraph" style:parent-style-name="Standard">
      <style:paragraph-properties fo:text-align="start" style:justify-single-word="false"/>
      <style:text-properties style:font-name="Roboto Mono" style:font-name-asian="Roboto Mono1" style:font-name-complex="Roboto Mono1"/>
    </style:style>
    <style:style style:name="P4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text-align="start" style:justify-single-word="false" fo:text-indent="-0.25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Roboto Mono" style:font-name-asian="Roboto Mono1" style:font-name-complex="Roboto Mono1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 this assignment we will explore a few of the “object patterns” from PLAI, again using the <text:a xlink:type="simple" xlink:href="http://smol-tutor.xyz/stacker/" text:style-name="ListLabel_20_28" text:visited-style-name="ListLabel_20_28"><text:span text:style-name="T1">Stacker</text:span></text:a>.</text:p>
      <text:p text:style-name="Standard"/>
      <text:p text:style-name="Standard">The programs will be rewritten to conform to the SMoL (which is intentionally low on features, since it represents a common linguistic abstraction). For instance, we replace symbols with strings, <text:span text:style-name="T2">case</text:span> with <text:span text:style-name="T2">cond</text:span>. We will also get rid of some of the methods to keep the code simpler.</text:p>
      <text:p text:style-name="Heading_20_2"><text:bookmark text:name="_1b05lnoa7pt5"/></text:p>
      <text:p text:style-name="P9"><text:bookmark text:name="_qb4ft8lnurhi"/>Basic Objects</text:p>
      <text:p text:style-name="P1"/>
      <text:p text:style-name="P1">This program is a simple version of the basic object pattern:</text:p>
      <text:p text:style-name="P3"/>
      <text:p text:style-name="P1"><text:span text:style-name="T2">(deffun (o-state-2 init)</text:span></text:p>
      <text:p text:style-name="P1"><text:span text:style-name="T2"><text:s text:c="2"/>(lambda (m)</text:span></text:p>
      <text:p text:style-name="P1"><text:span text:style-name="T2"><text:s text:c="4"/>(cond</text:span></text:p>
      <text:p text:style-name="P1"><text:span text:style-name="T2"><text:s text:c="2"/><text:tab/>[(eq? m "inc")</text:span></text:p>
      <text:p text:style-name="P1"><text:span text:style-name="T2"><text:s text:c="7"/>(lambda () (set! init (+ init 1)))]</text:span></text:p>
      <text:p text:style-name="P1"><text:span text:style-name="T2"><text:s text:c="2"/><text:tab/>[(eq? m "get")</text:span></text:p>
      <text:p text:style-name="P1"><text:span text:style-name="T2"><text:s text:c="7"/>(lambda () init)]</text:span></text:p>
      <text:p text:style-name="P1"><text:span text:style-name="T2"><text:s text:c="2"/><text:tab/>[else</text:span></text:p>
      <text:p text:style-name="P1"><text:span text:style-name="T2"><text:s text:c="7"/>(error "undefined method")])))</text:span></text:p>
      <text:p text:style-name="P3"/>
      <text:p text:style-name="P1"><text:span text:style-name="T2">(defvar o (o-state-2 5))</text:span></text:p>
      <text:p text:style-name="P1"><text:span text:style-name="T2">((o "inc"))</text:span></text:p>
      <text:p text:style-name="P1"><text:span text:style-name="T2">((o "get"))</text:span></text:p>
      <text:p text:style-name="P1"/>
      <text:p text:style-name="P1"><text:a xlink:type="simple" xlink:href="https://smol-tutor.xyz/stacker/?syntax=Lispy&amp;randomSeed=smol&amp;hole=%E2%80%A2&amp;nNext=0&amp;program=%28deffun+%28o-state-2+init%29%0A++%28lambda+%28m%29%0A++++%28cond%0A++%09%5B%28eq%3F+m+%22inc%22%29%0A+++++++%28lambda+%28%29+%28set%21+init+%28%2B+init+1%29%29%29%5D%0A++%09%5B%28eq%3F+m+%22get%22%29%0A+++++++%28lambda+%28%29+init%29%5D%0A++%09%5Belse%0A+++++++%28error+%22undefined+method%22%29%5D%29%29%29%0A%0A%28defvar+o+%28o-state-2+5%29%29%0A%28%28o+%22inc%22%29%29%0A%28%28o+%22get%22%29%29%0A" text:style-name="ListLabel_20_28" text:visited-style-name="ListLabel_20_28"><text:span text:style-name="T1">Run this program</text:span></text:a> through to completion.</text:p>
      <text:list xml:id="list3610298085" text:style-name="WWNum2">
        <text:list-item>
          <text:p text:style-name="P4">Provide a screenshot of your final configuration.</text:p>
        </text:list-item>
        <text:list-item>
          <text:p text:style-name="P4">You should see four closures. Using the addresses in the above configuration:</text:p>
          <text:list>
            <text:list-item>
              <text:p text:style-name="P7">Which of these correspond to <text:span text:style-name="T4">objects</text:span>, and why? </text:p>
            </text:list-item>
            <text:list-item>
              <text:p text:style-name="P7">Which of these correspond to <text:span text:style-name="T4">classes</text:span>, and why?</text:p>
            </text:list-item>
          </text:list>
        </text:list-item>
      </text:list>
      <text:p text:style-name="P1"/>
      <text:p text:style-name="P9"><text:bookmark text:name="_nfxuuemwy2ev"/>Static Members</text:p>
      <text:p text:style-name="P1"/>
      <text:p text:style-name="P1">This program represents the <text:span text:style-name="T2">static</text:span> pattern, where <text:span text:style-name="T2">counter</text:span> is the static member:</text:p>
      <text:p text:style-name="P1"/>
      <text:p text:style-name="P1"><text:span text:style-name="T2">(defvar o-static-1</text:span></text:p>
      <text:p text:style-name="P1"><text:span text:style-name="T2"><text:s text:c="2"/>(let ([counter 0])</text:span></text:p>
      <text:p text:style-name="P1"><text:span text:style-name="T2"><text:s text:c="4"/>(lambda (amount)</text:span></text:p>
      <text:p text:style-name="P1"><text:span text:style-name="T2"><text:s text:c="2"/><text:tab/>(set! counter (+ 1 counter))</text:span></text:p>
      <text:p text:style-name="P1"><text:span text:style-name="T2"><text:s text:c="2"/><text:tab/>(lambda (m)</text:span></text:p>
      <text:p text:style-name="P1"><text:span text:style-name="T2"><text:s text:c="8"/>(cond</text:span></text:p>
      <text:p text:style-name="P1"><text:span text:style-name="T2"><text:s text:c="10"/>[(eq? m "inc")</text:span></text:p>
      <text:p text:style-name="P1"><text:span text:style-name="T2"><text:s text:c="7"/><text:tab/>(lambda () (set! amount (+ amount 1)))]</text:span></text:p>
      <text:p text:style-name="P1"><text:span text:style-name="T2"><text:s text:c="10"/>[(eq? m "count")</text:span></text:p>
      <text:p text:style-name="P1"><text:span text:style-name="T2"><text:s text:c="7"/><text:tab/>counter]</text:span></text:p>
      <text:p text:style-name="P1"><text:span text:style-name="T2"><text:s text:c="10"/>[else</text:span></text:p>
      <text:p text:style-name="P1"><text:span text:style-name="T2"><text:s text:c="7"/><text:tab/>(error "undefined member")])))))</text:span></text:p>
      <text:p text:style-name="P3"/>
      <text:p text:style-name="P1"><text:span text:style-name="T2">(defvar o-1 (o-static-1 5))</text:span></text:p>
      <text:p text:style-name="P1"><text:span text:style-name="T2">(defvar o-2 (o-static-1 7))</text:span></text:p>
      <text:p text:style-name="P1"><text:span text:style-name="T2">((o-2 "inc"))</text:span></text:p>
      <text:p text:style-name="P1"><text:span text:style-name="T2">(o-2 "count")</text:span></text:p>
      <text:p text:style-name="P3"/>
      <text:p text:style-name="P1"><text:a xlink:type="simple" xlink:href="https://smol-tutor.xyz/stacker/?syntax=Lispy&amp;randomSeed=smol&amp;hole=%E2%80%A2&amp;nNext=0&amp;program=%28defvar+o-static-1%0A++%28let+%28%5Bcounter+0%5D%29%0A++++%28lambda+%28amount%29%0A++%09%28set%21+counter+%28%2B+1+counter%29%29%0A++%09%28lambda+%28m%29%0A++++++++%28cond%0A++++++++++%5B%28eq%3F+m+%22inc%22%29%0A+++++++%09%28lambda+%28%29+%28set%21+amount+%28%2B+amount+1%29%29%29%5D%0A++++++++++%5B%28eq%3F+m+%22count%22%29%0A+++++++%09counter%5D%0A++++++++++%5Belse%0A+++++++%09%28error+%22undefined+member%22%29%5D%29%29%29%29%29%0A%0A%28defvar+o-1+%28o-static-1+5%29%29%0A%28defvar+o-2+%28o-static-1+7%29%29%0A%28%28o-2+%22inc%22%29%29%0A%28o-2+%22count%22%29%0A" text:style-name="ListLabel_20_28" text:visited-style-name="ListLabel_20_28"><text:span text:style-name="T1">Run this program</text:span></text:a> through to completion.</text:p>
      <text:list xml:id="list1413135765" text:style-name="WWNum1">
        <text:list-item>
          <text:p text:style-name="P5">Provide a screenshot of your final configuration.</text:p>
        </text:list-item>
        <text:list-item>
          <text:p text:style-name="P5">How many objects are created? Where are they located in your configuration (using the addresses in the above screenshot)?</text:p>
        </text:list-item>
        <text:list-item>
          <text:p text:style-name="P5">Trace through the configuration to show why <text:span text:style-name="T2">counter</text:span> behaves like a <text:span text:style-name="T2">static</text:span>.</text:p>
        </text:list-item>
      </text:list>
      <text:p text:style-name="P1"><text:soft-page-break/></text:p>
      <text:p text:style-name="P1"/>
      <text:p text:style-name="Heading_20_2"><text:bookmark text:name="_5qhvtq8a6yr6"/></text:p>
      <text:p text:style-name="P9"><text:bookmark text:name="_c9awtoi3va8u"/>Dynamic Dispatch</text:p>
      <text:p text:style-name="Standard"/>
      <text:p text:style-name="Standard">The following program represents the “dynamic dispatch” pattern.</text:p>
      <text:p text:style-name="P2"/>
      <text:p text:style-name="Standard"><text:span text:style-name="T2">(defvar mt</text:span></text:p>
      <text:p text:style-name="Standard"><text:span text:style-name="T2"><text:s text:c="2"/>(let ([self "dummy"])</text:span></text:p>
      <text:p text:style-name="Standard"><text:span text:style-name="T2"><text:s text:c="4"/>(set! self</text:span></text:p>
      <text:p text:style-name="Standard"><text:span text:style-name="T2"><text:s text:c="10"/>(lambda (m)</text:span></text:p>
      <text:p text:style-name="Standard"><text:span text:style-name="T2"><text:s text:c="12"/>(cond</text:span></text:p>
      <text:p text:style-name="Standard"><text:span text:style-name="T2"><text:s text:c="10"/><text:tab/> <text:s text:c="2"/>[(eq? m "sum")</text:span></text:p>
      <text:p text:style-name="Standard"><text:span text:style-name="T2"><text:s text:c="15"/>(lambda () 0)]</text:span></text:p>
      <text:p text:style-name="Standard"><text:span text:style-name="T2"><text:s text:c="10"/><text:tab/> <text:s text:c="2"/>[else</text:span></text:p>
      <text:p text:style-name="Standard"><text:span text:style-name="T2"><text:s text:c="15"/>(error "mt")])))</text:span></text:p>
      <text:p text:style-name="Standard"><text:span text:style-name="T2"><text:s text:c="4"/>self))</text:span></text:p>
      <text:p text:style-name="Standard"><text:span text:style-name="T2"><text:s/></text:span></text:p>
      <text:p text:style-name="Standard"><text:span text:style-name="T2">(deffun (node v l r)</text:span></text:p>
      <text:p text:style-name="Standard"><text:span text:style-name="T2"><text:s text:c="2"/>(let ([self "dummy"])</text:span></text:p>
      <text:p text:style-name="Standard"><text:span text:style-name="T2"><text:s text:c="4"/>(set! self</text:span></text:p>
      <text:p text:style-name="Standard"><text:span text:style-name="T2"><text:s text:c="10"/>(lambda (m)</text:span></text:p>
      <text:p text:style-name="Standard"><text:span text:style-name="T2"><text:s text:c="12"/>(cond</text:span></text:p>
      <text:p text:style-name="Standard"><text:span text:style-name="T2"><text:s text:c="10"/><text:tab/> <text:s text:c="2"/>[(equal? m "sum")</text:span></text:p>
      <text:p text:style-name="Standard"><text:span text:style-name="T2"><text:s text:c="15"/>(lambda () (+ v</text:span></text:p>
      <text:p text:style-name="Standard"><text:span text:style-name="T2"><text:s text:c="29"/>((l "sum"))</text:span></text:p>
      <text:p text:style-name="Standard"><text:span text:style-name="T2"><text:s text:c="29"/>((r "sum"))))]</text:span></text:p>
      <text:p text:style-name="Standard"><text:span text:style-name="T2"><text:s text:c="14"/>[else</text:span></text:p>
      <text:p text:style-name="Standard"><text:span text:style-name="T2"><text:s text:c="15"/>(error "node")])))</text:span></text:p>
      <text:p text:style-name="Standard"><text:soft-page-break/><text:span text:style-name="T2"><text:s text:c="4"/>self))</text:span></text:p>
      <text:p text:style-name="P2"/>
      <text:p text:style-name="Standard"><text:span text:style-name="T2">(defvar a-tree</text:span></text:p>
      <text:p text:style-name="Standard"><text:span text:style-name="T2"><text:s text:c="2"/>(node 10</text:span></text:p>
      <text:p text:style-name="Standard"><text:span text:style-name="T2"><text:s text:c="8"/>(node 5 mt mt)</text:span></text:p>
      <text:p text:style-name="Standard"><text:span text:style-name="T2"><text:s text:c="8"/>mt))</text:span></text:p>
      <text:p text:style-name="P2"/>
      <text:p text:style-name="Standard"><text:span text:style-name="T2">((a-tree "sum"))</text:span></text:p>
      <text:p text:style-name="Standard"/>
      <text:p text:style-name="Standard">We have simplified the program slightly: <text:span text:style-name="T2">mt</text:span> is a <text:a xlink:type="simple" xlink:href="https://en.wikipedia.org/wiki/Singleton_pattern" text:style-name="ListLabel_20_28" text:visited-style-name="ListLabel_20_28"><text:span text:style-name="T1">singleton</text:span></text:a>. Because it has no parameters, we have also gotten rid of the constructor and focused on the core object representation.</text:p>
      <text:p text:style-name="Standard"/>
      <text:list xml:id="list2174144571" text:style-name="WWNum3">
        <text:list-item>
          <text:p text:style-name="P6"><text:a xlink:type="simple" xlink:href="https://smol-tutor.xyz/stacker/?syntax=Lispy&amp;randomSeed=smol&amp;hole=%E2%80%A2&amp;nNext=0&amp;program=%28defvar+mt%0A++%28let+%28%5Bself+%22dummy%22%5D%29%0A++++%28set%21+self%0A++++++++++%28lambda+%28m%29%0A++++++++++++%28cond%0A++++++++++%09+++%5B%28eq%3F+m+%22sum%22%29%0A+++++++++++++++%28lambda+%28%29+0%29%5D%0A++++++++++%09+++%5Belse%0A+++++++++++++++%28error+%22mt%22%29%5D%29%29%29%0A++++self%29%29%0A+%0A%28deffun+%28node+v+l+r%29%0A++%28let+%28%5Bself+%22dummy%22%5D%29%0A++++%28set%21+self%0A++++++++++%28lambda+%28m%29%0A++++++++++++%28cond%0A++++++++++%09+++%5B%28equal%3F+m+%22sum%22%29%0A+++++++++++++++%28lambda+%28%29+%28%2B+v%0A+++++++++++++++++++++++++++++%28%28l+%22sum%22%29%29%0A+++++++++++++++++++++++++++++%28%28r+%22sum%22%29%29%29%29%5D%0A++++++++++++++%5Belse%0A+++++++++++++++%28error+%22node%22%29%5D%29%29%29%0A++++self%29%29%0A%0A%28defvar+a-tree%0A++%28node+10%0A++++++++%28node+5+mt+mt%29%0A++++++++mt%29%29%0A%0A%28%28a-tree+%22sum%22%29%29%0A" text:style-name="ListLabel_20_28" text:visited-style-name="ListLabel_20_28"><text:span text:style-name="T1">Run this program</text:span></text:a> and provide a screenshot of the configuration at the point where the <text:span text:style-name="T2">a-tree</text:span> object has been initialized and before the method dispatch begins.</text:p>
        </text:list-item>
        <text:list-item>
          <text:p text:style-name="P6">In the above configuration, point out which values represent <text:span text:style-name="T2">mt</text:span> and <text:span text:style-name="T2">node</text:span> <text:span text:style-name="T4">objects</text:span>. Do any values here correspond to <text:span text:style-name="T4">classes</text:span>? If so, which one(s) and why?</text:p>
        </text:list-item>
        <text:list-item>
          <text:p text:style-name="P6">Dynamic dispatch depends on objects having a consistent representation (this is the heart of “object polymorphism”: you can treat them interchangeably, and the differences in behavior are hidden inside the objects). In what way do these objects have a consistent representatio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1pt" fo:language="en" fo:country="none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orgia" fo:font-size="11pt" fo:language="en" fo:country="none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77" meta:word-count="459" meta:character-count="3137" meta:non-whitespace-character-count="2396"/>
    <meta:generator>LibreOfficeDev/6.0.5.2$Linux_X86_64 LibreOffice_project/</meta:generator>
  </office:meta>
</office:document-meta>
</file>