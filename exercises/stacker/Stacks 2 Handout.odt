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2000002926B37CCC59419B059.png" manifest:media-type="image/png"/>
  <manifest:file-entry manifest:full-path="Pictures/100002010000045A000001F88BB32825DE1922E0.png" manifest:media-type="image/png"/>
  <manifest:file-entry manifest:full-path="Pictures/100002010000047E000001FC1C8FA3111709551D.png" manifest:media-type="image/png"/>
  <manifest:file-entry manifest:full-path="Pictures/10000201000004400000032C3087250ABA765FBF.png" manifest:media-type="image/png"/>
  <manifest:file-entry manifest:full-path="Pictures/1000020100000482000002400B559FDA0A8B12A6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188038" style:font-name="Roboto Mono" style:font-name-asian="Roboto Mono1" style:font-name-complex="Roboto Mono1"/>
    </style:style>
    <style:style style:name="T5" style:family="text">
      <style:text-properties style:font-name="Roboto Mono" style:font-name-asian="Roboto Mono1" style:font-name-complex="Roboto Mono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 this assignment, we will continue to improve our understanding of SMoL through the <text:a xlink:type="simple" xlink:href="https://smol-tutor.xyz/stacker/" text:style-name="ListLabel_20_1" text:visited-style-name="ListLabel_20_1"><text:span text:style-name="T1">Stacker</text:span></text:a>. The same rules apply to this assignment as in <text:a xlink:type="simple" xlink:href="https://docs.google.com/document/d/1aYkobEqKcpG_Ul6fVS1VMsotLXDYHv3S32okLLSfa2U/edit?tab=t.0" text:style-name="ListLabel_20_1" text:visited-style-name="ListLabel_20_1"><text:span text:style-name="T1">Stacks 1 Handout</text:span></text:a>.</text:p>
      <text:p text:style-name="Standard"/>
      <text:p text:style-name="Standard">This assignment has four problems. All four show a configuration (or pair of configurations) and ask you to <text:span text:style-name="T2">construct a program</text:span> that could have produced what you see. Once again, we want you to get as close to an <text:span text:style-name="T2">exact match</text:span> as possible (modulo the random addresses).</text:p>
      <text:p text:style-name="Standard"/>
      <text:p text:style-name="Standard">For each program, <text:span text:style-name="T3">transcribe your reasoning</text:span>: what caused you to produce this particular program?</text:p>
      <text:p text:style-name="Standard"/>
      <text:p text:style-name="Standard"><text:span text:style-name="T2">A Note About Writing</text:span>:</text:p>
      <text:p text:style-name="Standard"/>
      <text:p text:style-name="Standard">Please don’t turn in stream-of-consciousness prose. You can write that as a rough draft to yourself if you like, but please go over it and clean it up before turning it in. Ideally, arrange it as a bulleted list or other organized form of deductions instead of an unstructured paragraph or wall-of-text.</text:p>
      <text:p text:style-name="Standard"/>
      <text:p text:style-name="Standard">Even if your paragraph is well-structured, a format like a bulleted list will make following it easier. Imagine taking an item-by-item recipe and merging it all into a single paragraph — or putting all the statements in your program on a single line…</text:p>
      <text:p text:style-name="Standard"/>
      <text:p text:style-name="Standard">If your text is too hard to read, we won’t grade it.</text:p>
      <text:p text:style-name="Standard"/>
      <text:p text:style-name="Standard"><text:span text:style-name="T3">Finally</text:span>: answer this question. <text:span text:style-name="T2">The Atlantic</text:span> magazine has a game called <text:a xlink:type="simple" xlink:href="https://www.theatlantic.com/games/bracket-city/" text:style-name="ListLabel_20_1" text:visited-style-name="ListLabel_20_1"><text:span text:style-name="T1">Bracket City</text:span></text:a>. Why are we mentioning it in relation to this pair of assignments? Answer as precisely as possible.</text:p>
      <text:p text:style-name="P1"/>
      <text:p text:style-name="P2"><text:span text:style-name="T3">1.</text:span></text:p>
      <text:p text:style-name="P1"/>
      <text:p text:style-name="Standard"><draw:frame draw:style-name="fr1" draw:name="image1.png" text:anchor-type="as-char" svg:width="6.5in" svg:height="3.25in" draw:z-index="0"><draw:image xlink:href="Pictures/1000020100000482000002400B559FDA0A8B12A6.png" xlink:type="simple" xlink:show="embed" xlink:actuate="onLoad" loext:mime-type="image/png"/></draw:frame></text:p>
      <text:p text:style-name="Standard"/>
      <text:p text:style-name="Standard">The “Returning <text:span text:style-name="T4">0</text:span>”, the environment @4617, and the function value are from <text:span text:style-name="T5">pause</text:span>. You should include <text:span text:style-name="T5">pause</text:span> in the program that you construct.</text:p>
      <text:p text:style-name="Standard"/>
      <text:p text:style-name="P1"/>
      <text:p text:style-name="P2"><text:span text:style-name="T3">2.</text:span></text:p>
      <text:p text:style-name="Standard"><draw:frame draw:style-name="fr1" draw:name="image3.png" text:anchor-type="as-char" svg:width="6.5in" svg:height="4.8472in" draw:z-index="0"><draw:image xlink:href="Pictures/10000201000004400000032C3087250ABA765FBF.png" xlink:type="simple" xlink:show="embed" xlink:actuate="onLoad" loext:mime-type="image/png"/></draw:frame></text:p>
      <text:p text:style-name="P2"><text:span text:style-name="T3">3.</text:span></text:p>
      <text:p text:style-name="Standard"/>
      <text:p text:style-name="Standard"><draw:frame draw:style-name="fr1" draw:name="image4.png" text:anchor-type="as-char" svg:width="6.5in" svg:height="2.8752in" draw:z-index="0"><draw:image xlink:href="Pictures/100002010000047E000001FC1C8FA3111709551D.png" xlink:type="simple" xlink:show="embed" xlink:actuate="onLoad" loext:mime-type="image/png"/></draw:frame></text:p>
      <text:p text:style-name="Standard"/>
      <text:p text:style-name="P1"/>
      <text:p text:style-name="P1"/>
      <text:p text:style-name="P1"/>
      <text:p text:style-name="P2"><text:span text:style-name="T3">4.</text:span></text:p>
      <text:p text:style-name="Standard"/>
      <text:p text:style-name="Standard">Here is a <text:span text:style-name="T2">pair</text:span> of configurations, <text:span text:style-name="T3">C1</text:span> and <text:span text:style-name="T3">C2</text:span>, with a few steps skipped in-between (concretely, Next was clicked 5 times after the first to obtain the second, but your solution does not need to match that exactly as long as it makes sense):</text:p>
      <text:p text:style-name="Standard"/>
      <text:p text:style-name="Standard"><text:span text:style-name="T3">C1:</text:span></text:p>
      <text:p text:style-name="Standard"><draw:frame draw:style-name="fr1" draw:name="image2.png" text:anchor-type="as-char" svg:width="6.5in" svg:height="2.9445in" draw:z-index="0"><draw:image xlink:href="Pictures/100002010000045A000001F88BB32825DE1922E0.png" xlink:type="simple" xlink:show="embed" xlink:actuate="onLoad" loext:mime-type="image/png"/></draw:frame></text:p>
      <text:p text:style-name="Standard"/>
      <text:p text:style-name="Standard"><text:span text:style-name="T3">C2:</text:span></text:p>
      <text:p text:style-name="Standard"><draw:frame draw:style-name="fr1" draw:name="image5.png" text:anchor-type="as-char" svg:width="6.5in" svg:height="3.8055in" draw:z-index="0"><draw:image xlink:href="Pictures/1000020100000462000002926B37CCC59419B05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eorgia" fo:font-size="11pt" fo:language="en" fo:country="none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Georgia" fo:font-size="11pt" fo:language="en" fo:country="none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5" meta:paragraph-count="21" meta:word-count="301" meta:character-count="1722" meta:non-whitespace-character-count="1436"/>
    <meta:generator>LibreOfficeDev/6.0.5.2$Linux_X86_64 LibreOffice_project/</meta:generator>
  </office:meta>
</office:document-meta>
</file>