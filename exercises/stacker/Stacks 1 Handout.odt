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400000384671ED2A69975F921.png" manifest:media-type="image/png"/>
  <manifest:file-entry manifest:full-path="Pictures/1000020100000486000001BE5533712AE90DCCC8.png" manifest:media-type="image/png"/>
  <manifest:file-entry manifest:full-path="Pictures/10000201000002F6000004BA63D529D60A6C2FB7.png" manifest:media-type="image/png"/>
  <manifest:file-entry manifest:full-path="Pictures/10000201000002F8000002CCF59FEAA51BF768F9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rdo" svg:font-family="Cardo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rdo1" svg:font-family="Cardo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style:font-name="Roboto Mono" style:font-name-asian="Roboto Mono1" style:font-name-complex="Roboto Mono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font-name="Roboto Mono" style:font-name-asian="Roboto Mono1" style:font-name-complex="Roboto Mono1"/>
    </style:style>
    <style:style style:name="T5" style:family="text">
      <style:text-properties style:font-name="Cardo" style:font-name-asian="Cardo1" style:font-name-complex="Cardo1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In this assignment, you will improve your understanding of SMoL using the output from the <text:a xlink:type="simple" xlink:href="https://smol-tutor.xyz/stacker/" text:style-name="ListLabel_20_10" text:visited-style-name="ListLabel_20_10"><text:span text:style-name="T1">Stacker</text:span></text:a>. In every case, you will be shown a trace configuration and asked to perform some interpretive task. You are welcome to run the Stacker yourself if it will help you construct answers. </text:p>
      <text:p text:style-name="Standard"/>
      <text:p text:style-name="Standard">In this assignment, we will have two kinds of activities:</text:p>
      <text:p text:style-name="Standard"/>
      <text:list xml:id="list2389445010" text:style-name="WWNum1">
        <text:list-item>
          <text:p text:style-name="P3">Given a configuration, <text:span text:style-name="T2">construct a program</text:span> that could have produced that trace. Ideally we want an <text:span text:style-name="T2">exact</text:span> match (except, of course, for the random addresses and line numbers), but get as close as you can.</text:p>
        </text:list-item>
        <text:list-item>
          <text:p text:style-name="P3">Given a configuration, <text:span text:style-name="T2">determine the value of the program</text:span> from the trace.</text:p>
        </text:list-item>
      </text:list>
      <text:p text:style-name="Standard"/>
      <text:p text:style-name="Standard">For all programs, assume that the program contained a function called <text:span text:style-name="T4">pause</text:span> that had been defined in the program as follows:</text:p>
      <text:p text:style-name="Standard"/>
      <text:p text:style-name="Standard"><text:span text:style-name="T4">(deffun (pause) 0)</text:span></text:p>
      <text:p text:style-name="Standard"/>
      <text:p text:style-name="Standard">(The following programs are intentionally written to only use additive arithmetic, so that the result of <text:span text:style-name="T4">pause</text:span> will not affect the result.) Imagine that the call to <text:span text:style-name="T4">pause</text:span> is about to finish at the point where the configuration was captured.</text:p>
      <text:p text:style-name="Standard"/>
      <text:p text:style-name="P6"><text:bookmark text:name="_5evhk11caswu"/><text:span text:style-name="T5">Configuration → Program</text:span></text:p>
      <text:p text:style-name="Standard"/>
      <text:p text:style-name="Standard">In this portion, we will show you two Stacker trace configurations. For each one, you should write a program that, when run, will result in this configuration.</text:p>
      <text:p text:style-name="Standard"/>
      <text:p text:style-name="Standard">In each problem, the “Returning 0” and the bottommost environment are from <text:span text:style-name="T4">pause</text:span>. You should include <text:span text:style-name="T4">pause</text:span> and its definition in the programs that you construct.</text:p>
      <text:p text:style-name="Standard"/>
      <text:p text:style-name="Standard">As you might have guessed, infinitely many programs could have produced each configuration. Therefore, there is not only one “correct” answer. We do ask that you try to produce a reasonably minimal solution and avoid flights of fancy. If you really want to get clever, then also include a simple solution!</text:p>
      <text:p text:style-name="Standard"/>
      <text:p text:style-name="Standard">(There are two problems, one each on the two successive pages.)</text:p>
      <text:p text:style-name="Standard"/>
      <text:p text:style-name="P4"><text:span text:style-name="T6">1.</text:span></text:p>
      <text:p text:style-name="Standard"><draw:frame draw:style-name="fr1" draw:name="image1.png" text:anchor-type="as-char" svg:width="6.5in" svg:height="6.1252in" draw:z-index="0"><draw:image xlink:href="Pictures/10000201000002F8000002CCF59FEAA51BF768F9.png" xlink:type="simple" xlink:show="embed" xlink:actuate="onLoad" loext:mime-type="image/png"/></draw:frame></text:p>
      <text:p text:style-name="Standard"/>
      <text:p text:style-name="Standard">(We hide the “<text:span text:style-name="T6">Heap-allocated Values</text:span>” column from the screenshot)</text:p>
      <text:p text:style-name="Standard"/>
      <text:p text:style-name="P4"><text:span text:style-name="T6">2.</text:span></text:p>
      <text:p text:style-name="Standard"/>
      <text:p text:style-name="Standard"><draw:frame draw:style-name="fr1" draw:name="image2.png" text:anchor-type="as-char" svg:width="6.5in" svg:height="2.5in" draw:z-index="0"><draw:image xlink:href="Pictures/1000020100000486000001BE5533712AE90DCCC8.png" xlink:type="simple" xlink:show="embed" xlink:actuate="onLoad" loext:mime-type="image/png"/></draw:frame></text:p>
      <text:p text:style-name="Heading_20_2"><text:bookmark text:name="_md808apl5pgr"/></text:p>
      <text:p text:style-name="P6"><text:bookmark text:name="_6e0z6hlrg51e"/><text:span text:style-name="T5">Configuration → Value</text:span></text:p>
      <text:p text:style-name="Standard"/>
      <text:p text:style-name="Standard">In this part, we will show you two configurations and ask you to determine what value the program will produce. Recall that <text:span text:style-name="T4">pause</text:span> is designed to not impact the answer.</text:p>
      <text:p text:style-name="Standard"/>
      <text:p text:style-name="Standard">In your response, as your school math teachers used to say, “show your work”. Don’t just give us the answer (a number) but give us a sense of how you arrived at it. You don’t have to be very verbose, just enough to confirm that you understand the mapping from configurations to program results.</text:p>
      <text:p text:style-name="Standard"/>
      <text:p text:style-name="Standard">(There are two problems, one each on the two successive pages.)</text:p>
      <text:p text:style-name="P4"><text:span text:style-name="T6">3.</text:span></text:p>
      <text:p text:style-name="Standard"><draw:frame draw:style-name="fr1" draw:name="image4.png" text:anchor-type="as-char" svg:width="4.7154in" svg:height="5.6217in" draw:z-index="0"><draw:image xlink:href="Pictures/10000201000002F400000384671ED2A69975F921.png" xlink:type="simple" xlink:show="embed" xlink:actuate="onLoad" loext:mime-type="image/png"/></draw:frame></text:p>
      <text:p text:style-name="P1"/>
      <text:p text:style-name="P1"/>
      <text:p text:style-name="P4"><text:span text:style-name="T6">4.</text:span></text:p>
      <text:p text:style-name="P2"/>
      <text:p text:style-name="Standard"><draw:frame draw:style-name="fr1" draw:name="image3.png" text:anchor-type="as-char" svg:width="3.8902in" svg:height="6.2028in" draw:z-index="0"><draw:image xlink:href="Pictures/10000201000002F6000004BA63D529D60A6C2F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rdo" svg:font-family="Cardo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rdo1" svg:font-family="Cardo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1pt" fo:language="en" fo:country="none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Georgia" fo:font-size="11pt" fo:language="en" fo:country="none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7" meta:paragraph-count="25" meta:word-count="400" meta:character-count="2330" meta:non-whitespace-character-count="1951"/>
    <meta:generator>LibreOfficeDev/6.0.5.2$Linux_X86_64 LibreOffice_project/</meta:generator>
  </office:meta>
</office:document-meta>
</file>